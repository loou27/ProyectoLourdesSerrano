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Bahnschrift SemiLight" fo:font-size="21pt" style:text-underline-style="none" officeooo:rsid="000e0828" officeooo:paragraph-rsid="000e0828" style:font-size-asian="21pt" style:font-size-complex="21pt"/>
    </style:style>
    <style:style style:name="P2" style:family="paragraph" style:parent-style-name="Standard">
      <style:text-properties style:font-name="Bahnschrift SemiLight" fo:font-size="20pt" style:text-underline-style="none" officeooo:rsid="000e0828" officeooo:paragraph-rsid="000e0828" style:font-size-asian="20pt" style:font-size-complex="20pt"/>
    </style:style>
    <style:style style:name="P3" style:family="paragraph" style:parent-style-name="Standard">
      <style:text-properties style:font-name="Bahnschrift SemiLight" fo:font-size="12pt" style:text-underline-style="none" officeooo:rsid="000e0828" officeooo:paragraph-rsid="000f120d" style:font-size-asian="10.5pt" style:font-size-complex="12pt"/>
    </style:style>
    <style:style style:name="P4" style:family="paragraph" style:parent-style-name="Standard">
      <style:text-properties style:font-name="Bahnschrift SemiLight" fo:font-size="12pt" style:text-underline-style="none" officeooo:rsid="000f120d" officeooo:paragraph-rsid="000f120d" style:font-size-asian="10.5pt" style:font-size-complex="12pt"/>
    </style:style>
    <style:style style:name="P5" style:family="paragraph" style:parent-style-name="Standard">
      <style:text-properties style:font-name="Bahnschrift SemiLight" fo:font-size="11pt" style:text-underline-style="none" officeooo:rsid="000e0828" officeooo:paragraph-rsid="0010d8b1" style:font-size-asian="11pt" style:font-size-complex="11pt"/>
    </style:style>
    <style:style style:name="P6" style:family="paragraph" style:parent-style-name="Standard">
      <style:text-properties style:font-name="Bahnschrift SemiLight" fo:font-size="11pt" style:text-underline-style="none" officeooo:rsid="000e0828" officeooo:paragraph-rsid="000e0828" style:font-size-asian="11pt" style:font-size-complex="11pt"/>
    </style:style>
    <style:style style:name="P7" style:family="paragraph" style:parent-style-name="Standard">
      <style:text-properties style:font-name="Bahnschrift SemiLight" fo:font-size="12pt" style:text-underline-style="none" officeooo:rsid="000e0828" officeooo:paragraph-rsid="000e0828" style:font-size-asian="10.5pt" style:font-size-complex="12pt"/>
    </style:style>
    <style:style style:name="P8" style:family="paragraph" style:parent-style-name="Standard">
      <style:text-properties style:font-name="Bahnschrift SemiLight" fo:font-size="21pt" style:text-underline-style="none" officeooo:rsid="000e0828" officeooo:paragraph-rsid="000e0828" style:font-size-asian="18.3500003814697pt" style:font-size-complex="21pt"/>
    </style:style>
    <style:style style:name="P9" style:family="paragraph" style:parent-style-name="Standard">
      <style:text-properties fo:color="#000000" loext:opacity="100%" style:font-name="Bahnschrift SemiLight" fo:font-size="12pt" style:text-underline-style="none" officeooo:rsid="0012065e" officeooo:paragraph-rsid="00152a1d" style:font-size-asian="10.5pt" style:font-size-complex="12pt"/>
    </style:style>
    <style:style style:name="P10" style:family="paragraph" style:parent-style-name="Standard">
      <style:text-properties style:font-name="Bahnschrift SemiLight" fo:font-size="12pt" style:text-underline-style="none" officeooo:rsid="0012eeda" officeooo:paragraph-rsid="0012eeda" style:font-size-asian="10.5pt" style:font-size-complex="12pt"/>
    </style:style>
    <style:style style:name="P11" style:family="paragraph" style:parent-style-name="Standard">
      <style:text-properties style:font-name="Bahnschrift SemiLight" fo:font-size="12pt" style:text-underline-style="none" officeooo:rsid="0010d8b1" officeooo:paragraph-rsid="0010d8b1" style:font-size-asian="10.5pt" style:font-size-complex="12pt"/>
    </style:style>
    <style:style style:name="P12" style:family="paragraph" style:parent-style-name="Standard">
      <style:text-properties fo:color="#111111" loext:opacity="100%" style:font-name="Bahnschrift SemiLight" fo:font-size="12pt" fo:font-style="italic" style:text-underline-style="none" officeooo:rsid="000e0828" officeooo:paragraph-rsid="000e0828" style:font-size-asian="10.5pt" style:font-style-asian="italic" style:font-size-complex="12pt" style:font-style-complex="italic"/>
    </style:style>
    <style:style style:name="P13" style:family="paragraph" style:parent-style-name="Standard">
      <style:text-properties fo:color="#000000" loext:opacity="100%" style:font-name="Bahnschrift SemiLight" fo:font-size="12pt" style:text-underline-style="none" fo:font-weight="bold" officeooo:rsid="0012065e" officeooo:paragraph-rsid="00152a1d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Bahnschrift SemiLight" fo:font-size="21pt" style:text-underline-style="none" officeooo:rsid="0011de3a" officeooo:paragraph-rsid="0011de3a" style:font-size-asian="18.3500003814697pt" style:font-size-complex="21pt"/>
    </style:style>
    <style:style style:name="P15" style:family="paragraph" style:parent-style-name="Standard">
      <style:text-properties fo:color="#000000" loext:opacity="100%" style:font-name="Bahnschrift SemiLight" fo:font-size="12pt" style:text-underline-style="none" officeooo:rsid="00117c48" officeooo:paragraph-rsid="00117c48" style:font-size-asian="10.5pt" style:font-size-complex="12pt"/>
    </style:style>
    <style:style style:name="P16" style:family="paragraph" style:parent-style-name="Standard">
      <style:text-properties fo:color="#000000" loext:opacity="100%" style:font-name="Bahnschrift SemiLight" fo:font-size="12pt" style:text-underline-style="none" fo:font-weight="bold" officeooo:rsid="0011de3a" officeooo:paragraph-rsid="0011de3a" style:font-size-asian="10.5pt" style:font-weight-asian="bold" style:font-size-complex="12pt" style:font-weight-complex="bold"/>
    </style:style>
    <style:style style:name="P17" style:family="paragraph" style:parent-style-name="Standard">
      <style:text-properties fo:color="#000000" loext:opacity="100%" style:font-name="Bahnschrift SemiLight" fo:font-size="12pt" style:text-underline-style="none" officeooo:rsid="0011de3a" officeooo:paragraph-rsid="0011de3a" style:font-size-asian="10.5pt" style:font-size-complex="12pt"/>
    </style:style>
    <style:style style:name="P18" style:family="paragraph" style:parent-style-name="Standard">
      <style:text-properties fo:color="#000000" loext:opacity="100%" style:font-name="Bahnschrift SemiLight" fo:font-size="12pt" style:text-underline-style="none" fo:font-weight="bold" officeooo:rsid="00117c48" officeooo:paragraph-rsid="00117c48" style:font-size-asian="10.5pt" style:font-weight-asian="bold" style:font-size-complex="12pt" style:font-weight-complex="bold"/>
    </style:style>
    <style:style style:name="P19" style:family="paragraph" style:parent-style-name="Standard">
      <style:text-properties fo:color="#000000" loext:opacity="100%" style:font-name="Bahnschrift SemiLight" fo:font-size="12pt" style:text-underline-style="none" officeooo:rsid="00117c48" officeooo:paragraph-rsid="00152a1d" style:font-size-asian="10.5pt" style:font-size-complex="12pt"/>
    </style:style>
    <style:style style:name="P20" style:family="paragraph" style:parent-style-name="Standard">
      <style:text-properties fo:color="#000000" loext:opacity="100%" style:font-name="Bahnschrift SemiLight" fo:font-size="21pt" style:text-underline-style="none" officeooo:rsid="0012065e" officeooo:paragraph-rsid="00152a1d" style:font-size-asian="18.3500003814697pt" style:font-size-complex="21pt"/>
    </style:style>
    <style:style style:name="P21" style:family="paragraph" style:parent-style-name="Standard">
      <style:text-properties fo:color="#000000" loext:opacity="100%" style:font-name="Bahnschrift SemiLight" fo:font-size="12pt" style:text-underline-style="none" officeooo:rsid="0012065e" officeooo:paragraph-rsid="0012065e" style:font-size-asian="10.5pt" style:font-size-complex="12pt"/>
    </style:style>
    <style:style style:name="P22" style:family="paragraph" style:parent-style-name="Standard">
      <style:text-properties fo:color="#000000" loext:opacity="100%" style:font-name="Bahnschrift SemiLight" fo:font-size="12pt" style:text-underline-style="none" fo:font-weight="bold" officeooo:rsid="0012065e" officeooo:paragraph-rsid="0012065e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000000" loext:opacity="100%" style:font-name="Bahnschrift SemiLight" fo:font-size="21pt" style:text-underline-style="none" officeooo:rsid="0012eeda" officeooo:paragraph-rsid="00152a1d" style:font-size-asian="18.3500003814697pt" style:font-size-complex="21pt"/>
    </style:style>
    <style:style style:name="P24" style:family="paragraph" style:parent-style-name="Standard">
      <style:text-properties fo:color="#000000" loext:opacity="100%" style:font-name="Bahnschrift SemiLight" fo:font-size="12pt" style:text-underline-style="none" officeooo:rsid="0012eeda" officeooo:paragraph-rsid="0012eeda" style:font-size-asian="10.5pt" style:font-size-complex="12pt"/>
    </style:style>
    <style:style style:name="P25" style:family="paragraph" style:parent-style-name="Standard">
      <style:text-properties fo:color="#000000" loext:opacity="100%" style:font-name="Bahnschrift SemiLight" fo:font-size="12pt" style:text-underline-style="none" fo:font-weight="bold" officeooo:rsid="0012eeda" officeooo:paragraph-rsid="0012eeda" style:font-size-asian="10.5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Bahnschrift SemiLight" fo:font-size="21pt" style:text-underline-style="none" officeooo:rsid="0012eeda" officeooo:paragraph-rsid="0012eeda" style:font-size-asian="18.3500003814697pt" style:font-size-complex="21pt"/>
    </style:style>
    <style:style style:name="T1" style:family="text">
      <style:text-properties officeooo:rsid="00147063"/>
    </style:style>
    <style:style style:name="T2" style:family="text">
      <style:text-properties officeooo:rsid="00152a1d"/>
    </style:style>
    <style:style style:name="T3" style:family="text">
      <style:text-properties officeooo:rsid="0012eeda"/>
    </style:style>
    <style:style style:name="T4" style:family="text">
      <style:text-properties fo:color="#000000" loext:opacity="100%"/>
    </style:style>
    <style:style style:name="T5" style:family="text">
      <style:text-properties officeooo:rsid="0011de3a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licación de Escritorio Java JDBC + DAO + Swing</text:h>
      <text:p text:style-name="P2">Introducción</text:p>
      <text:p text:style-name="P3">En este documento podrás encontrar toda la documentación referida a esta aplicación de escritorio. </text:p>
      <text:p text:style-name="P3">En ella manejamos una base de datos de la cafetería del IES Francisco Ayala, donde podremos almacenar clientes, productos y pedidos. Tendremos dos formas de acceder a ella, mediante consola con el archivo Main.java o mediante vistas (Swing) con el archivo MainJSwing.java</text:p>
      <text:p text:style-name="P4">Encontraremos organizado el proyecto de la siguiente forma:</text:p>
      <text:p text:style-name="P4"/>
      <text:p text:style-name="P5">lib/</text:p>
      <text:p text:style-name="P5">└── (librerías externas del proyecto)</text:p>
      <text:p text:style-name="P5"/>
      <text:p text:style-name="P5">src/</text:p>
      <text:p text:style-name="P5">├── dao/ ← <text:span text:style-name="T1">DAO e implementaciones DAO</text:span></text:p>
      <text:p text:style-name="P5">│ <text:s text:c="2"/>├── ClienteDAO.<text:span text:style-name="T1">java</text:span></text:p>
      <text:p text:style-name="P5">│ <text:s text:c="2"/>├── ClienteDAOImpl.<text:span text:style-name="T1">java</text:span></text:p>
      <text:p text:style-name="P5">│ <text:s text:c="2"/>├── PedidoDAO.<text:span text:style-name="T1">java</text:span></text:p>
      <text:p text:style-name="P5">│ <text:s text:c="2"/>├── PedidoDAOImpl.<text:span text:style-name="T1">java</text:span></text:p>
      <text:p text:style-name="P5">│ <text:s text:c="2"/>├── PedidoProductoDAO.<text:span text:style-name="T1">java</text:span></text:p>
      <text:p text:style-name="P5">│ <text:s text:c="2"/>├── PedidoProductoDAOImpl.<text:span text:style-name="T1">java</text:span></text:p>
      <text:p text:style-name="P5">│ <text:s text:c="2"/>├── ProductoDAO.<text:span text:style-name="T1">java</text:span></text:p>
      <text:p text:style-name="P5">│ <text:s text:c="2"/>└── ProductoDAOImpl.<text:span text:style-name="T1">java</text:span></text:p>
      <text:p text:style-name="P5">│</text:p>
      <text:p text:style-name="P5">├── model/ ← <text:span text:style-name="T1">Capa Modelo</text:span></text:p>
      <text:p text:style-name="P5">│ <text:s text:c="2"/>├── Cliente.<text:span text:style-name="T1">java</text:span></text:p>
      <text:p text:style-name="P5">│ <text:s text:c="2"/>├── Pedido.<text:span text:style-name="T1">java</text:span></text:p>
      <text:p text:style-name="P5">│ <text:s text:c="2"/>├── Producto.<text:span text:style-name="T1">java</text:span></text:p>
      <text:p text:style-name="P5">│ <text:s text:c="2"/>└── TipoCliente.<text:span text:style-name="T1">java</text:span></text:p>
      <text:p text:style-name="P5">│</text:p>
      <text:p text:style-name="P5">├── db/ ← <text:span text:style-name="T1">Conexión a la base de datos</text:span></text:p>
      <text:p text:style-name="P5">│ <text:s text:c="2"/>└── ConexionDB.<text:span text:style-name="T1">java</text:span></text:p>
      <text:p text:style-name="P5"/>
      <text:p text:style-name="P5"/>
      <text:p text:style-name="P5">view/ ← <text:span text:style-name="T1">Vistas (Swing)</text:span></text:p>
      <text:p text:style-name="P5">├── cliente/</text:p>
      <text:p text:style-name="P5">│ <text:s text:c="2"/>├── AltaClientePanel.<text:span text:style-name="T1">java</text:span></text:p>
      <text:p text:style-name="P5">│ <text:s text:c="2"/>├── ClientesPanel.<text:span text:style-name="T1">java</text:span></text:p>
      <text:p text:style-name="P5">│ <text:s text:c="2"/>└── EditarClientePanel.<text:span text:style-name="T1">java</text:span></text:p>
      <text:p text:style-name="P5">│</text:p>
      <text:p text:style-name="P5">├── comun/</text:p>
      <text:p text:style-name="P5">│ <text:s text:c="2"/>├── AbstractCatalogoProductosPanel.<text:span text:style-name="T1">java</text:span></text:p>
      <text:p text:style-name="P5">│ <text:s text:c="2"/>└── AbstractPanelBotones.<text:span text:style-name="T1">java</text:span></text:p>
      <text:p text:style-name="P5">│</text:p>
      <text:p text:style-name="P5">├── pedidos/</text:p>
      <text:p text:style-name="P5">│ <text:s text:c="2"/>├── NuevoPedidoPanel.<text:span text:style-name="T1">java</text:span></text:p>
      <text:p text:style-name="P5"><text:soft-page-break/>│ <text:s text:c="2"/>├── PedidoDetallePanel.<text:span text:style-name="T1">java</text:span></text:p>
      <text:p text:style-name="P5">│ <text:s text:c="2"/>└── PedidosListaPanel.<text:span text:style-name="T1">java</text:span></text:p>
      <text:p text:style-name="P5">│</text:p>
      <text:p text:style-name="P5">├── principal/</text:p>
      <text:p text:style-name="P5">│ <text:s text:c="2"/>└── MainPanel.<text:span text:style-name="T1">java</text:span></text:p>
      <text:p text:style-name="P5">│</text:p>
      <text:p text:style-name="P5">└── producto/</text:p>
      <text:p text:style-name="P5"><text:s text:c="4"/>├── AltaProductoPanel.<text:span text:style-name="T1">java</text:span></text:p>
      <text:p text:style-name="P5"><text:s text:c="4"/>├── EditarProductoPanel.<text:span text:style-name="T1">java</text:span></text:p>
      <text:p text:style-name="P5"><text:s text:c="4"/>└── ProductosPanel.<text:span text:style-name="T1">java</text:span></text:p>
      <text:p text:style-name="P5"/>
      <text:p text:style-name="P5"/>
      <text:p text:style-name="P5">documentacion/ ← <text:span text:style-name="T1">Documentación en diferentes tipos de archivos</text:span></text:p>
      <text:p text:style-name="P5">├── README.md</text:p>
      <text:p text:style-name="P5">├── documentacion.pdf</text:p>
      <text:p text:style-name="P5">└── documentacion.<text:span text:style-name="T1">odt</text:span></text:p>
      <text:p text:style-name="P5"/>
      <text:p text:style-name="P5"/>
      <text:p text:style-name="P5"><text:span text:style-name="T2">i</text:span>nit<text:span text:style-name="T2">db</text:span>.<text:span text:style-name="T2">sql</text:span> ← <text:span text:style-name="T1">Lista de todas las consultas utilizadas para la base de datos</text:span></text:p>
      <text:p text:style-name="P5">Main.<text:span text:style-name="T2">java</text:span> ← <text:span text:style-name="T1">Main por consola(VSC)</text:span></text:p>
      <text:p text:style-name="P5">Main<text:span text:style-name="T2">JSwing.java</text:span> ← <text:span text:style-name="T1">Main Swing</text:span></text:p>
      <text:p text:style-name="P5">docker-compose.<text:span text:style-name="T2">yml</text:span>← <text:span text:style-name="T2">Crea una serie de servicios Docker para poder iniciar la aplicación</text:span></text:p>
      <text:p text:style-name="P6"/>
      <text:p text:style-name="P7"/>
      <text:p text:style-name="P8">Base de datos</text:p>
      <text:p text:style-name="P8"/>
      <text:p text:style-name="P9">Base de datos: cafeteria_ayala <text:s/>| <text:s/>Host: localhost:3308</text:p>
      <text:p text:style-name="P10">Toda la información de la base de datos como tablas y datos están almacenados en initdb.sql <text:span text:style-name="T2">para poder ejecutar las consultas.</text:span></text:p>
      <text:p text:style-name="P11"><text:span text:style-name="T3">Si quisiéramos verlo en la consola del propio ordenador c</text:span>on el siguiente comando podremos mostrar por pantalla toda la base de datos en formato SQL:</text:p>
      <text:p text:style-name="P11"/>
      <text:p text:style-name="P12">docker exec mysql-java-server /usr/bin/mysqldump -u root --password=admin cafeteria_ayala</text:p>
      <text:p text:style-name="P12"/>
      <text:p text:style-name="P13">ConexionDB.java</text:p>
      <text:p text:style-name="P9">-Proporciona la conexión MySQL mediante DriverManager.</text:p>
      <text:p text:style-name="P9">-Requiere el conector MySQL (jar) en Referenced Libraries.</text:p>
      <text:p text:style-name="P7"/>
      <text:p text:style-name="P14"><text:span text:style-name="T4">Capa de Modelo</text:span></text:p>
      <text:p text:style-name="P15"/>
      <text:p text:style-name="P15">Para la parte de modelo hay 8 archivos, 4 de ellos enums que acompañan a los demás.</text:p>
      <text:p text:style-name="P15">En cada uno están declaradas las variables, los constructores y los getters and setters.</text:p>
      <text:p text:style-name="P15"/>
      <text:p text:style-name="P16"/>
      <text:p text:style-name="P16"/>
      <text:p text:style-name="P16"><text:soft-page-break/>¿Por qué hay 3 constructores?</text:p>
      <text:p text:style-name="P17">Se crean 3 constructores porque cada uno permite crear objetos de una forma distinta dependiendo de la necesidad del programa.</text:p>
      <text:p text:style-name="P17">Un constructor permite crear el cliente sin ID, porque la base de datos lo genera automáticamente(incrementando), otro crea el objeto con todos los datos y el vacío permite asignarlos más tarde con setters.</text:p>
      <text:p text:style-name="P15"/>
      <text:p text:style-name="P18"/>
      <text:p text:style-name="P18">Clases principales:</text:p>
      <text:p text:style-name="P15"><text:s text:c="2"/>- Cliente <text:s text:c="15"/>→ Tiene id, nombre y tipo (ALUMNO / PROFESOR)</text:p>
      <text:p text:style-name="P15"><text:s text:c="2"/>- Producto <text:s text:c="12"/>→ Tiene id, nombre, precio, cantidad y tipo (COMIDA / BEBIDA)</text:p>
      <text:p text:style-name="P15"><text:s text:c="2"/>- Pedido <text:s text:c="16"/>→ Tiene id, precio total, método de pago, estado y cliente asociado <text:tab/><text:tab/><text:tab/> <text:s text:c="3"/><text:span text:style-name="T5">(clienteID)</text:span></text:p>
      <text:p text:style-name="P15"><text:s text:c="2"/>- PedidoProducto <text:s/>→ Relación entre un pedido y sus productos (cantidad incluida)</text:p>
      <text:p text:style-name="P15"><text:s/></text:p>
      <text:p text:style-name="P18">Enumeraciones:</text:p>
      <text:p text:style-name="P15"><text:s text:c="2"/>- TipoCliente <text:s text:c="4"/>→ ALUMNO, PROFESOR</text:p>
      <text:p text:style-name="P15"><text:s text:c="2"/>- TipoProducto <text:s/>→ COMIDA, BEBIDA</text:p>
      <text:p text:style-name="P15"><text:s text:c="2"/>- Estado <text:s text:c="11"/>→ ABIERTO, CERRADO</text:p>
      <text:p text:style-name="P15"><text:s text:c="2"/>- MetodoPago <text:s text:c="2"/>→ EFECTIVO, TARJETA, BIZUM</text:p>
      <text:p text:style-name="P19"><text:s/></text:p>
      <text:p text:style-name="P20">Capa DAO e Implementaciones</text:p>
      <text:p text:style-name="P21">Arquitectura DAO (Data Access Object) que separa la lógica de acceso a base de datos del resto de la aplicación. Cada entidad tiene una interfaz y su implementación.</text:p>
      <text:p text:style-name="P21"><text:s/></text:p>
      <text:p text:style-name="P21"><text:s/></text:p>
      <text:p text:style-name="P22">Clases principales:</text:p>
      <text:p text:style-name="P21"><text:s text:c="2"/>- Cliente <text:s text:c="8"/>→ id, nombre, tipo (ALUMNO / PROFESOR)</text:p>
      <text:p text:style-name="P21"><text:s text:c="2"/>- Producto <text:s text:c="7"/>→ id, nombre, precio, cantidad, tipo (COMIDA / BEBIDA)</text:p>
      <text:p text:style-name="P21"><text:s text:c="2"/>- Pedido <text:s text:c="9"/>→ id, precio total, método de pago, estado, cliente asociado</text:p>
      <text:p text:style-name="P21"><text:s text:c="2"/>- PedidoProducto <text:s/>→ relación entre pedido y producto con cantidad</text:p>
      <text:p text:style-name="P21"><text:s/></text:p>
      <text:p text:style-name="P22">Enumeraciones:</text:p>
      <text:p text:style-name="P21"><text:s text:c="2"/>- TipoCliente <text:s/>→ ALUMNO, PROFESOR</text:p>
      <text:p text:style-name="P21"><text:s text:c="2"/>- TipoProducto → COMIDA, BEBIDA</text:p>
      <text:p text:style-name="P21"><text:s text:c="2"/>- Estado <text:s text:c="6"/>→ ABIERTO, CERRADO</text:p>
      <text:p text:style-name="P21"><text:s text:c="2"/>- MetodoPago <text:s text:c="2"/>→ EFECTIVO, TARJETA, BIZUM</text:p>
      <text:p text:style-name="P21"><text:s/></text:p>
      <text:p text:style-name="P22"/>
      <text:p text:style-name="P22">ClienteDAO / ClienteDAOImpl</text:p>
      <text:p text:style-name="P21"/>
      <text:p text:style-name="P21"><text:s text:c="2"/>- añadirCliente(Cliente) <text:s text:c="4"/>→ INSERT en tabla cliente</text:p>
      <text:p text:style-name="P21"><text:s text:c="2"/>- borrarCliente(int id) <text:s text:c="5"/>→ DELETE por id</text:p>
      <text:p text:style-name="P21"><text:s text:c="2"/>- buscarCliente(String nombre) → SELECT por nombre</text:p>
      <text:p text:style-name="P21"><text:s text:c="2"/>- listarClientes() <text:s text:c="10"/>→ SELECT todos</text:p>
      <text:p text:style-name="P21"><text:soft-page-break/><text:s/></text:p>
      <text:p text:style-name="P22">ProductoDAO / ProductoDAOImpl</text:p>
      <text:p text:style-name="P21"><text:s text:c="2"/>- añadirProducto(Producto) <text:s text:c="4"/>→ INSERT en tabla producto</text:p>
      <text:p text:style-name="P21"><text:s text:c="2"/>- borrarProducto(int id) <text:s text:c="6"/>→ DELETE por id</text:p>
      <text:p text:style-name="P21"><text:s text:c="2"/>- modificarProducto(Producto) <text:s/>→ UPDATE por id</text:p>
      <text:p text:style-name="P21"><text:s text:c="2"/>- buscarProducto(int id) <text:s text:c="6"/>→ SELECT por id (lanza Exception si no existe)</text:p>
      <text:p text:style-name="P21"><text:s text:c="2"/>- listarProductos() <text:s text:c="11"/>→ SELECT todos</text:p>
      <text:p text:style-name="P21"><text:s/></text:p>
      <text:p text:style-name="P21"><text:span text:style-name="T6">PedidoDAO / PedidoDAOImpl</text:span></text:p>
      <text:p text:style-name="P21"><text:s text:c="2"/>- añadirPedido(Pedido) <text:s text:c="6"/>→ INSERT en tabla pedido (sin metodo_pago por ahora)</text:p>
      <text:p text:style-name="P21"><text:s text:c="2"/>- borrarPedido(int id) <text:s text:c="6"/>→ DELETE por id</text:p>
      <text:p text:style-name="P21"><text:s text:c="2"/>- modificarPedido(Pedido) <text:s text:c="3"/>→ UPDATE por id (incluye metodo_pago y precio_total)</text:p>
      <text:p text:style-name="P21"><text:s text:c="2"/>- buscarPedido(String nombre)→ SELECT por nombre</text:p>
      <text:p text:style-name="P21"><text:s text:c="2"/>- listarPedidos() <text:s text:c="11"/>→ SELECT todos, calcula precio sumando productos</text:p>
      <text:p text:style-name="P21"><text:s/></text:p>
      <text:p text:style-name="P22">PedidoProductoDAO / PedidoProductoDAOImpl</text:p>
      <text:p text:style-name="P21"><text:s text:c="2"/>- añadirProducto(int pedidoId, int productoId, int cantidad)</text:p>
      <text:p text:style-name="P9">→ INSERT en tabla pedido_producto</text:p>
      <text:p text:style-name="P23"/>
      <text:p text:style-name="P23">Swing / vistas</text:p>
      <text:p text:style-name="P24">Interfaz gráfica desarrollada en Java Swing con navegación mediante CardLayout (sistema de "tarjetas" que se muestran y ocultan sin abrir nuevas ventanas).</text:p>
      <text:p text:style-name="P24"><text:s text:c="2"/></text:p>
      <text:p text:style-name="P24">view/</text:p>
      <text:p text:style-name="P24">├── principal/</text:p>
      <text:p text:style-name="P24">│ <text:s text:c="2"/>└── MainJPanel.java <text:s text:c="26"/>→ Menú principal</text:p>
      <text:p text:style-name="P24">├── comun/</text:p>
      <text:p text:style-name="P24">│ <text:s text:c="2"/>├── AbstractPanelBotones.java <text:s text:c="9"/>→ Panel base reutilizable</text:p>
      <text:p text:style-name="P24">│ <text:s text:c="2"/>└── AbstractCatalogoProductosPanel.java→ Catálogo de productos reutilizable</text:p>
      <text:p text:style-name="P24">├── cliente/</text:p>
      <text:p text:style-name="P24">│ <text:s text:c="2"/>├── ClientesJPanel.java <text:s text:c="19"/>→ Lista de clientes</text:p>
      <text:p text:style-name="P24">│ <text:s text:c="2"/>├── AltaClientePanel.java <text:s text:c="16"/>→ Formulario nuevo cliente</text:p>
      <text:p text:style-name="P24">│ <text:s text:c="2"/>└── EditarClientePanel.java <text:s text:c="13"/>→ Formulario editar cliente</text:p>
      <text:p text:style-name="P24">├── producto/</text:p>
      <text:p text:style-name="P24">│ <text:s text:c="2"/>├── ProductosJPanel.java <text:s text:c="16"/>→ Catálogo de productos</text:p>
      <text:p text:style-name="P24">│ <text:s text:c="2"/>├── AltaProductoPanel.java <text:s text:c="13"/>→ Formulario nuevo producto</text:p>
      <text:p text:style-name="P24">│ <text:s text:c="2"/>└── EditarProductoPanel.java <text:s text:c="10"/>→ Formulario editar producto</text:p>
      <text:p text:style-name="P24">└── pedidos/</text:p>
      <text:p text:style-name="P24"><text:s text:c="4"/>├── PedidosListaPanel.java <text:s text:c="14"/>→ Lista de pedidos abiertos</text:p>
      <text:p text:style-name="P24"><text:s text:c="4"/>├── NuevoPedidoPanel.java <text:s text:c="13"/>→ Formulario nuevo pedido</text:p>
      <text:p text:style-name="P24"><text:s text:c="4"/>└── PedidoDetallePanel.java <text:s text:c="11"/>→ Detalle y cobro de pedido</text:p>
      <text:p text:style-name="P24"><text:s/></text:p>
      <text:p text:style-name="P24"><text:s/></text:p>
      <text:p text:style-name="P25"/>
      <text:p text:style-name="P25"><text:soft-page-break/>CLASES COMUNES (view/comun)</text:p>
      <text:p text:style-name="P25"/>
      <text:p text:style-name="P24"><text:span text:style-name="T6">AbstractPanelBotones</text:span></text:p>
      <text:p text:style-name="P24">Panel base del que heredan ClientesJPanel, ProductosJPanel</text:p>
      <text:p text:style-name="P24">y MainJPanel. Proporciona:</text:p>
      <text:p text:style-name="P24"><text:s text:c="2"/>- Cabecera con título, botón "Menu principal" y botones</text:p>
      <text:p text:style-name="P24"><text:s text:c="4"/>"Añadir" / "Actualizar" (opcionales).</text:p>
      <text:p text:style-name="P24"><text:s text:c="2"/>- Rejilla de 4 columnas con botones generados desde getBotones().</text:p>
      <text:p text:style-name="P24"><text:s text:c="2"/>- Método refreshGrid() para recargar la rejilla.</text:p>
      <text:p text:style-name="P24"><text:s/></text:p>
      <text:p text:style-name="P24">Métodos a sobreescribir por las subclases:</text:p>
      <text:p text:style-name="P24"><text:s text:c="2"/>- getTitulo() <text:s text:c="8"/>→ texto del título</text:p>
      <text:p text:style-name="P24"><text:s text:c="2"/>- getBotones() <text:s text:c="7"/>→ lista de etiquetas para la rejilla</text:p>
      <text:p text:style-name="P24"><text:s text:c="2"/>- añadirRegistro() <text:s text:c="3"/>→ acción del botón Añadir</text:p>
      <text:p text:style-name="P24"><text:s text:c="2"/>- actualizarRegistro()→ acción del botón Actualizar</text:p>
      <text:p text:style-name="P24"><text:s text:c="2"/>- mostrarBotonAñadir()→ si es false, oculta Añadir y Actualizar</text:p>
      <text:p text:style-name="P24"><text:s/></text:p>
      <text:p text:style-name="P24"/>
      <text:p text:style-name="P25">AbstractCatalogoProductosPanel</text:p>
      <text:p text:style-name="P24">Panel reutilizable que muestra productos agrupados por tipo</text:p>
      <text:p text:style-name="P24">(Comida / Bebida) en una rejilla de botones.</text:p>
      <text:p text:style-name="P24">Usado tanto en ProductosJPanel como en PedidoDetallePanel.</text:p>
      <text:p text:style-name="P24"><text:s/></text:p>
      <text:p text:style-name="P24"><text:s text:c="2"/>- refrescarCatalogo(List&lt;Producto&gt;) → repinta la rejilla</text:p>
      <text:p text:style-name="P24"><text:s text:c="2"/>- alSeleccionarProducto(Producto) <text:s text:c="2"/>→ acción al pulsar un producto</text:p>
      <text:p text:style-name="P24"><text:s text:c="40"/>(abstracto, lo define cada uso)</text:p>
      <text:p text:style-name="P24"><text:s text:c="2"/>- usarRejillaAdaptableAncho() <text:s text:c="6"/>→ si true, recalcula columnas</text:p>
      <text:p text:style-name="P24"><text:s text:c="40"/>al redimensionar la ventana</text:p>
      <text:p text:style-name="P24"><text:s/></text:p>
      <text:p text:style-name="P24"><text:s/></text:p>
      <text:p text:style-name="P25">MENÚ PRINCIPAL (view/principal)</text:p>
      <text:p text:style-name="P25"><text:s/></text:p>
      <text:p text:style-name="P24"><text:span text:style-name="T6">MainJPanel</text:span></text:p>
      <text:p text:style-name="P24">Hereda de AbstractPanelBotones. Muestra tres botones:</text:p>
      <text:p text:style-name="P24"><text:s text:c="2"/>- Clientes</text:p>
      <text:p text:style-name="P24"><text:s text:c="2"/>- Productos</text:p>
      <text:p text:style-name="P24"><text:s text:c="2"/>- Pedidos</text:p>
      <text:p text:style-name="P24"><text:s/></text:p>
      <text:p text:style-name="P24">No tiene botones Añadir / Actualizar.</text:p>
      <text:p text:style-name="P24"><text:s/></text:p>
      <text:p text:style-name="P25">SECCIÓN CLIENTES (view/cliente)</text:p>
      <text:p text:style-name="P25"/>
      <text:p text:style-name="P24"><text:span text:style-name="T6">ClientesJPanel</text:span></text:p>
      <text:p text:style-name="P24">Lista todos los clientes como botones en una rejilla.</text:p>
      <text:p text:style-name="P24"><text:s text:c="2"/>- Añadir <text:s text:c="4"/>→ navega a AltaClientePanel</text:p>
      <text:p text:style-name="P24"><text:s text:c="2"/>- Actualizar → navega a EditarClientePanel</text:p>
      <text:p text:style-name="P24"><text:soft-page-break/><text:s/><text:span text:style-name="T6">AltaClientePanel</text:span></text:p>
      <text:p text:style-name="P24">Formulario para crear un nuevo cliente.</text:p>
      <text:p text:style-name="P24"><text:s text:c="2"/>Campos: Nombre (texto), Tipo (combo: ALUMNO / PROFESOR)</text:p>
      <text:p text:style-name="P24"><text:s text:c="2"/>- Guardar <text:s/>→ inserta en BD y vuelve a la lista</text:p>
      <text:p text:style-name="P24"><text:s text:c="2"/>- Cancelar → vuelve a la lista sin guardar</text:p>
      <text:p text:style-name="P24"><text:s text:c="2"/>- Se limpia automáticamente al mostrarse</text:p>
      <text:p text:style-name="P24"><text:s/></text:p>
      <text:p text:style-name="P25">EditarClientePanel</text:p>
      <text:p text:style-name="P24">Formulario para modificar un cliente existente.</text:p>
      <text:p text:style-name="P24"><text:s text:c="2"/>- Combo superior para seleccionar el cliente a editar.</text:p>
      <text:p text:style-name="P24"><text:s text:c="2"/>- Al seleccionar, rellena los campos con sus datos actuales.</text:p>
      <text:p text:style-name="P24"><text:s text:c="2"/>Campos editables: Nombre, Tipo</text:p>
      <text:p text:style-name="P24"><text:s text:c="2"/>- Guardar <text:s/>→ actualiza en BD y vuelve a la lista</text:p>
      <text:p text:style-name="P24"><text:s text:c="2"/>- Cancelar → vuelve a la lista sin guardar</text:p>
      <text:p text:style-name="P24"><text:s/></text:p>
      <text:p text:style-name="P24"><text:s/></text:p>
      <text:p text:style-name="P25">SECCIÓN PRODUCTOS (view/producto)</text:p>
      <text:p text:style-name="P24"><text:s/></text:p>
      <text:p text:style-name="P24"><text:span text:style-name="T6">ProductosJPanel</text:span></text:p>
      <text:p text:style-name="P24">Muestra el catálogo de productos usando</text:p>
      <text:p text:style-name="P24">AbstractCatalogoProductosPanel (agrupado por Comida / Bebida).</text:p>
      <text:p text:style-name="P24"><text:s text:c="2"/>- Añadir <text:s text:c="4"/>→ navega a AltaProductoPanel</text:p>
      <text:p text:style-name="P24"><text:s text:c="2"/>- Actualizar → navega a EditarProductoPanel</text:p>
      <text:p text:style-name="P24"><text:s/></text:p>
      <text:p text:style-name="P25">AltaProductoPanel</text:p>
      <text:p text:style-name="P24">Formulario para crear un nuevo producto.</text:p>
      <text:p text:style-name="P24"><text:s text:c="2"/>Campos: Nombre, Cantidad, Precio, Tipo (COMIDA / BEBIDA)</text:p>
      <text:p text:style-name="P24"><text:s text:c="2"/>Validaciones: nombre no vacío, cantidad ≥ 0, precio ≥ 0</text:p>
      <text:p text:style-name="P24"><text:s text:c="2"/>- Guardar <text:s/>→ inserta en BD y vuelve al catálogo</text:p>
      <text:p text:style-name="P24"><text:s text:c="2"/>- Cancelar → vuelve sin guardar</text:p>
      <text:p text:style-name="P24"><text:s/></text:p>
      <text:p text:style-name="P24"><text:span text:style-name="T6">EditarProductoPanel</text:span></text:p>
      <text:p text:style-name="P24">Formulario para modificar un producto existente.</text:p>
      <text:p text:style-name="P24"><text:s text:c="2"/>- Combo superior para seleccionar el producto (muestra id – nombre).</text:p>
      <text:p text:style-name="P24"><text:s text:c="2"/>- Al seleccionar, rellena los campos con sus datos actuales.</text:p>
      <text:p text:style-name="P24"><text:s text:c="2"/>Campos editables: Nombre, Cantidad, Precio, Tipo</text:p>
      <text:p text:style-name="P24"><text:s text:c="2"/>Mismas validaciones que AltaProductoPanel.</text:p>
      <text:p text:style-name="P24"><text:s text:c="2"/>- Guardar <text:s/>→ actualiza en BD y vuelve al catálogo</text:p>
      <text:p text:style-name="P24"><text:s text:c="2"/>- Cancelar → vuelve sin guardar</text:p>
      <text:p text:style-name="P24"><text:s/></text:p>
      <text:p text:style-name="P24"><text:s/></text:p>
      <text:p text:style-name="P25"/>
      <text:p text:style-name="P25"/>
      <text:p text:style-name="P25"/>
      <text:p text:style-name="P25"/>
      <text:p text:style-name="P25"/>
      <text:p text:style-name="P25"><text:soft-page-break/>SECCIÓN PEDIDOS (view/pedidos)</text:p>
      <text:p text:style-name="P24"><text:s/></text:p>
      <text:p text:style-name="P24"><text:span text:style-name="T6">PedidosListaPanel</text:span></text:p>
      <text:p text:style-name="P24">Muestra la lista de pedidos con estado ABIERTO.</text:p>
      <text:p text:style-name="P24">Cada pedido aparece como un botón con formato:</text:p>
      <text:p text:style-name="P24"><text:s text:c="2"/>"Pedido #id – NombreCliente – precio €"</text:p>
      <text:p text:style-name="P24"><text:s text:c="2"/>- Nuevo pedido → navega a NuevoPedidoPanel</text:p>
      <text:p text:style-name="P24"><text:s text:c="2"/>- Al pulsar un pedido → abre PedidoDetallePanel para ese pedido</text:p>
      <text:p text:style-name="P24"><text:s text:c="2"/>- Se refresca automáticamente al mostrarse</text:p>
      <text:p text:style-name="P24"><text:s/></text:p>
      <text:p text:style-name="P24"><text:span text:style-name="T6">NuevoPedidoPanel</text:span></text:p>
      <text:p text:style-name="P24">Formulario para crear un nuevo pedido.</text:p>
      <text:p text:style-name="P24"><text:s text:c="2"/>- Combo para seleccionar el cliente.</text:p>
      <text:p text:style-name="P24"><text:s text:c="2"/>- Al confirmar: crea el pedido en BD con estado ABIERTO</text:p>
      <text:p text:style-name="P24"><text:s text:c="4"/>y navega directamente a PedidoDetallePanel.</text:p>
      <text:p text:style-name="P24"><text:s text:c="2"/>- Cancelar → vuelve a la lista de pedidos</text:p>
      <text:p text:style-name="P24"><text:s/></text:p>
      <text:p text:style-name="P24"><text:span text:style-name="T6">PedidoDetallePanel</text:span></text:p>
      <text:p text:style-name="P24">Panel principal de gestión de un pedido. Tiene dos modos</text:p>
      <text:p text:style-name="P24">internos que alternan sin cambiar de tarjeta:</text:p>
      <text:p text:style-name="P24"><text:s/></text:p>
      <text:p text:style-name="P25"><text:s text:c="2"/>MODO EDITAR:</text:p>
      <text:p text:style-name="P24"><text:s text:c="4"/>- Catálogo de productos (izquierda) para añadir líneas.</text:p>
      <text:p text:style-name="P24"><text:s text:c="4"/>- Tabla de líneas del pedido con columnas:</text:p>
      <text:p text:style-name="P24"><text:s text:c="8"/>Producto | Cantidad | P. unitario | Subtotal</text:p>
      <text:p text:style-name="P24"><text:s text:c="4"/>- Total del pedido actualizado en tiempo real.</text:p>
      <text:p text:style-name="P24"><text:s text:c="4"/>- Botón "Cerrar pedido" → pasa al modo cobro.</text:p>
      <text:p text:style-name="P24"><text:s/></text:p>
      <text:p text:style-name="P25"><text:s text:c="2"/>MODO COBRO (solo efectivo):</text:p>
      <text:p text:style-name="P24"><text:s text:c="4"/>- Muestra el total a pagar.</text:p>
      <text:p text:style-name="P24"><text:s text:c="4"/>- Campo para introducir el importe entregado.</text:p>
      <text:p text:style-name="P24"><text:s text:c="4"/>- Calcula y muestra el cambio en tiempo real.</text:p>
      <text:p text:style-name="P24"><text:s text:c="4"/>- Confirmar → cierra el pedido en BD con MetodoPago.EFECTIVO</text:p>
      <text:p text:style-name="P24"><text:s text:c="6"/>y vuelve a la lista de pedidos.</text:p>
      <text:p text:style-name="P24"><text:s text:c="4"/>- Volver al pedido → regresa al modo editar.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0828" officeooo:paragraph-rsid="000e0828"/>
    </style:style>
    <style:style style:name="MT1" style:family="text">
      <style:text-properties fo:color="#000000" loext:opacity="100%" style:font-name="Bahnschrift SemiLight" fo:background-color="transparent" loext:char-shading-value="0"/>
    </style:style>
    <style:style style:name="MT2" style:family="text">
      <style:text-properties fo:color="#000000" loext:opacity="100%" style:font-name="Bahnschrift SemiLight" officeooo:rsid="000e0828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55308d" fo:border-left="none" fo:border-right="none" fo:padding="0.051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ourdes Serrano Gallardo<text:tab/> <text:s text:c="11"/>Proyecto Final Programación<text:tab/>1ºDAW</text:p>
      </style:header>
      <style:footer>
        <text:p text:style-name="Footer"><text:tab/><text:span text:style-name="MT1"><text:page-number text:select-page="current">7</text:page-number></text:span><text:span text:style-name="MT1"> </text:span><text:span text:style-name="MT2">de 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12:01:55.509624700</meta:creation-date>
    <dc:date>2026-05-14T18:01:20.214676300</dc:date>
    <meta:editing-duration>PT14M48S</meta:editing-duration>
    <meta:editing-cycles>2</meta:editing-cycles>
    <meta:generator>LibreOffice/25.8.6.2$Windows_X86_64 LibreOffice_project/b4b39682cd9868fa725bc664aff94278d315bd04</meta:generator>
    <meta:document-statistic meta:table-count="0" meta:image-count="0" meta:object-count="0" meta:page-count="7" meta:paragraph-count="265" meta:word-count="1447" meta:character-count="10489" meta:non-whitespace-character-count="8469"/>
  </office:meta>
</office:document-meta>
</file>