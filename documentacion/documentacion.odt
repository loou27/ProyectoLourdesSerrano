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Bahnschrift SemiLight" fo:font-size="21pt" style:text-underline-style="none" officeooo:rsid="000e0828" officeooo:paragraph-rsid="000e0828" style:font-size-asian="21pt" style:font-size-complex="21pt"/>
    </style:style>
    <style:style style:name="P2" style:family="paragraph" style:parent-style-name="Standard">
      <style:text-properties style:font-name="Bahnschrift SemiLight" fo:font-size="22pt" style:text-underline-style="solid" style:text-underline-width="auto" style:text-underline-color="font-color" officeooo:rsid="000e0828" officeooo:paragraph-rsid="000e0828" style:font-size-asian="19.25pt" style:font-size-complex="22pt"/>
    </style:style>
    <style:style style:name="P3" style:family="paragraph" style:parent-style-name="Standard">
      <style:text-properties style:font-name="Bahnschrift SemiLight" fo:font-size="22pt" style:text-underline-style="none" officeooo:rsid="000e0828" officeooo:paragraph-rsid="000e0828" style:font-size-asian="19.25pt" style:font-size-complex="22pt"/>
    </style:style>
    <style:style style:name="P4" style:family="paragraph" style:parent-style-name="Standard">
      <style:text-properties style:font-name="Bahnschrift SemiLight" fo:font-size="12pt" style:text-underline-style="none" officeooo:rsid="000e0828" officeooo:paragraph-rsid="000f120d" style:font-size-asian="10.5pt" style:font-size-complex="12pt"/>
    </style:style>
    <style:style style:name="P5" style:family="paragraph" style:parent-style-name="Standard">
      <style:text-properties style:font-name="Bahnschrift SemiLight" fo:font-size="12pt" style:text-underline-style="none" officeooo:rsid="000f120d" officeooo:paragraph-rsid="000f120d" style:font-size-asian="10.5pt" style:font-size-complex="12pt"/>
    </style:style>
    <style:style style:name="P6" style:family="paragraph" style:parent-style-name="Standard">
      <style:text-properties style:font-name="Bahnschrift SemiLight" fo:font-size="12pt" style:text-underline-style="none" officeooo:rsid="000e0828" officeooo:paragraph-rsid="0010d8b1" style:font-size-asian="10.5pt" style:font-size-complex="12pt"/>
    </style:style>
    <style:style style:name="P7" style:family="paragraph" style:parent-style-name="Standard">
      <style:text-properties style:font-name="Bahnschrift SemiLight" fo:font-size="12pt" style:text-underline-style="none" officeooo:rsid="000e0828" officeooo:paragraph-rsid="000e0828" style:font-size-asian="10.5pt" style:font-size-complex="12pt"/>
    </style:style>
    <style:style style:name="P8" style:family="paragraph" style:parent-style-name="Standard">
      <style:text-properties style:font-name="Bahnschrift SemiLight" fo:font-size="21pt" style:text-underline-style="none" officeooo:rsid="000e0828" officeooo:paragraph-rsid="000e0828" style:font-size-asian="18.3500003814697pt" style:font-size-complex="21pt"/>
    </style:style>
    <style:style style:name="P9" style:family="paragraph" style:parent-style-name="Standard">
      <style:text-properties style:font-name="Bahnschrift SemiLight" fo:font-size="12pt" style:text-underline-style="none" officeooo:rsid="0010d8b1" officeooo:paragraph-rsid="0010d8b1" style:font-size-asian="10.5pt" style:font-size-complex="12pt"/>
    </style:style>
    <style:style style:name="P10" style:family="paragraph" style:parent-style-name="Standard">
      <style:text-properties fo:color="#111111" loext:opacity="100%" style:font-name="Bahnschrift SemiLight" fo:font-size="12pt" fo:font-style="italic" style:text-underline-style="none" officeooo:rsid="000e0828" officeooo:paragraph-rsid="000e0828" style:font-size-asian="10.5pt" style:font-style-asian="italic" style:font-size-complex="12pt" style:font-style-complex="italic"/>
    </style:style>
    <style:style style:name="P11" style:family="paragraph" style:parent-style-name="Standard">
      <style:text-properties fo:color="#ff0000" loext:opacity="100%" style:font-name="Bahnschrift SemiLight" fo:font-size="12pt" style:text-underline-style="none" officeooo:rsid="0010d8b1" officeooo:paragraph-rsid="0010d8b1" fo:background-color="transparent" style:font-size-asian="10.5pt" style:font-size-complex="12pt"/>
    </style:style>
    <style:style style:name="P12" style:family="paragraph" style:parent-style-name="Standard">
      <style:text-properties fo:color="#ff4000" loext:opacity="100%" style:font-name="Bahnschrift SemiLight" fo:font-size="12pt" style:text-underline-style="none" officeooo:rsid="000e0828" officeooo:paragraph-rsid="000e0828" style:font-size-asian="10.5pt" style:font-size-complex="12pt"/>
    </style:style>
    <style:style style:name="P13" style:family="paragraph" style:parent-style-name="Standard">
      <style:paragraph-properties fo:break-before="page"/>
      <style:text-properties fo:color="#000000" loext:opacity="100%" style:font-name="Bahnschrift SemiLight" fo:font-size="21pt" style:text-underline-style="none" officeooo:rsid="0011de3a" officeooo:paragraph-rsid="0011de3a" style:font-size-asian="18.3500003814697pt" style:font-size-complex="21pt"/>
    </style:style>
    <style:style style:name="P14" style:family="paragraph" style:parent-style-name="Standard">
      <style:text-properties fo:color="#000000" loext:opacity="100%" style:font-name="Bahnschrift SemiLight" fo:font-size="12pt" style:text-underline-style="none" officeooo:rsid="00117c48" officeooo:paragraph-rsid="00117c48" style:font-size-asian="10.5pt" style:font-size-complex="12pt"/>
    </style:style>
    <style:style style:name="P15" style:family="paragraph" style:parent-style-name="Standard">
      <style:text-properties fo:color="#000000" loext:opacity="100%" style:font-name="Bahnschrift SemiLight" fo:font-size="12pt" style:text-underline-style="none" fo:font-weight="bold" officeooo:rsid="0011de3a" officeooo:paragraph-rsid="0011de3a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style:font-name="Bahnschrift SemiLight" fo:font-size="12pt" style:text-underline-style="none" officeooo:rsid="0011de3a" officeooo:paragraph-rsid="0011de3a" style:font-size-asian="10.5pt" style:font-size-complex="12pt"/>
    </style:style>
    <style:style style:name="P17" style:family="paragraph" style:parent-style-name="Standard">
      <style:text-properties fo:color="#000000" loext:opacity="100%" style:font-name="Bahnschrift SemiLight" fo:font-size="12pt" style:text-underline-style="none" fo:font-weight="bold" officeooo:rsid="00117c48" officeooo:paragraph-rsid="00117c4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break-before="page"/>
      <style:text-properties fo:color="#000000" loext:opacity="100%" style:font-name="Bahnschrift SemiLight" fo:font-size="21pt" style:text-underline-style="none" officeooo:rsid="0012065e" officeooo:paragraph-rsid="0012065e" style:font-size-asian="18.3500003814697pt" style:font-size-complex="21pt"/>
    </style:style>
    <style:style style:name="P19" style:family="paragraph" style:parent-style-name="Standard">
      <style:text-properties fo:color="#000000" loext:opacity="100%" style:font-name="Bahnschrift SemiLight" fo:font-size="21pt" style:text-underline-style="none" officeooo:rsid="0012065e" officeooo:paragraph-rsid="0012065e" style:font-size-asian="18.3500003814697pt" style:font-size-complex="21pt"/>
    </style:style>
    <style:style style:name="T1" style:family="text">
      <style:text-properties fo:font-variant="normal" fo:text-transform="none" fo:color="#3a4a6b" loext:opacity="100%" fo:letter-spacing="normal"/>
    </style:style>
    <style:style style:name="T2" style:family="text">
      <style:text-properties officeooo:rsid="000f120d"/>
    </style:style>
    <style:style style:name="T3" style:family="text">
      <style:text-properties officeooo:rsid="0010d8b1"/>
    </style:style>
    <style:style style:name="T4" style:family="text">
      <style:text-properties fo:font-variant="normal" fo:text-transform="none" fo:color="#000000" loext:opacity="100%" fo:letter-spacing="normal" officeooo:rsid="0010d8b1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officeooo:rsid="0011d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licación de Escritorio Java JDBC + DAO + Swing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ntroducción</text:p>
      <text:p text:style-name="P3"/>
      <text:p text:style-name="P4">En este documento podrás encontrar toda la documentación referida a esta aplicación de escritorio. </text:p>
      <text:p text:style-name="P4">En ella manejamos una base de datos de la cafetería del IES Francisco Ayala, donde podremos almacenar clientes, productos y pedidos. Tendremos dos formas de acceder a ella, mediante consola con el archivo Main.java o mediante vistas (Swing) con el archivo MainJSwing.java</text:p>
      <text:p text:style-name="P5">Encontraremos organizado el proyecto de la siguiente forma:</text:p>
      <text:p text:style-name="P5"/>
      <text:p text:style-name="P6">src/<text:line-break/><text:span text:style-name="T1">├── </text:span>db/<text:span text:style-name="T1">          <text:s text:c="2"/> </text:span>← ConexionDB.java <text:line-break/><text:span text:style-name="T1">├── </text:span>model/<text:span text:style-name="T1">       </text:span>← <text:span text:style-name="T2">Producto.java, Cliente.java, Pedido.java, PedidoProducto.java y enums <text:tab/><text:tab/> <text:s text:c="8"/>(MetodoPago.java, TipoCliente.java, TipoProducto.java <text:s/></text:span><text:span text:style-name="T3">y Estado.java</text:span><text:span text:style-name="T2">).</text:span><text:line-break/><text:span text:style-name="T1">├── </text:span>dao/<text:span text:style-name="T1">         </text:span>← <text:span text:style-name="T2">Producto</text:span><text:span text:style-name="T3">DAO.java, ClienteDAO.java, PedidoDAO.java, <text:tab/> <text:tab/> <text:tab/><text:tab/><text:tab/> <text:s text:c="6"/>PedidoProductoDAO.java y sus implementaciones.</text:span><text:line-break/><text:span text:style-name="T1">├── </text:span>dto/<text:span text:style-name="T1">          </text:span>← Objetos de transferencia para consultas con JOIN<text:line-break/><text:span text:style-name="T1">├── </text:span>view/<text:span text:style-name="T1">        </text:span>← <text:span text:style-name="T3">AbstractJPanelButtons.java, ClientesJPanel.java, MainJPanel.java, <text:s text:c="15"/><text:tab/> <text:s text:c="18"/>ProductosJPanel.java</text:span><text:line-break/><text:span text:style-name="T1">└── </text:span>Main.java<text:span text:style-name="T1">    </text:span>← <text:span text:style-name="T3">Utilizado para pruebas en consola</text:span></text:p>
      <text:p text:style-name="P6"><text:span text:style-name="T1">└── </text:span><text:span text:style-name="T4">MainJSwing.java ← </text:span><text:span text:style-name="T5">Lanzador de la aplicación</text:span><text:line-break/><text:line-break/>documentacion/<text:line-break/><text:span text:style-name="T1">├── </text:span>README.md<text:span text:style-name="T1"> </text:span>← Documentación en Markdown <text:line-break/><text:span text:style-name="T1">├── </text:span>documentacion.pdf<text:span text:style-name="T1"> </text:span>← Documentación en PDF <text:line-break/><text:span text:style-name="T1">└── </text:span>documentacion.docx<text:span text:style-name="T1"> </text:span>← Documentación en Wor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Base de datos</text:p>
      <text:p text:style-name="P9">Con el siguiente comando podremos mostrar por pantalla toda la base de datos en formato SQL:</text:p>
      <text:p text:style-name="P9"/>
      <text:p text:style-name="P10">docker exec mysql-java-server /usr/bin/mysqldump -u root --password=admin cafeteria_ayala</text:p>
      <text:p text:style-name="P7"/>
      <text:p text:style-name="P11">*He editado el script para quitar cosas innecesarias</text:p>
      <text:p text:style-name="P7">mysqldump: [Warning] Using a password on the command line interface can be insecure.</text:p>
      <text:p text:style-name="P7">-- MySQL dump 10.13 <text:s/>Distrib 8.0.45, for Linux (x86_64)</text:p>
      <text:p text:style-name="P7">--</text:p>
      <text:p text:style-name="P7">-- Host: localhost <text:s text:c="3"/>Database: cafeteria_ayala</text:p>
      <text:p text:style-name="P7">-- ------------------------------------------------------</text:p>
      <text:p text:style-name="P7">-- Server version <text:s text:c="6"/>8.0.45</text:p>
      <text:p text:style-name="P7">--</text:p>
      <text:p text:style-name="P12">-- Table structure for table `cliente`</text:p>
      <text:p text:style-name="P7">--</text:p>
      <text:p text:style-name="P7"/>
      <text:p text:style-name="P7">DROP TABLE IF EXISTS `cliente`;</text:p>
      <text:p text:style-name="P7">CREATE TABLE `cliente` (</text:p>
      <text:p text:style-name="P7"><text:s text:c="2"/>`id` int NOT NULL AUTO_INCREMENT,</text:p>
      <text:p text:style-name="P7"><text:s text:c="2"/>`nombre` varchar(100) DEFAULT NULL,</text:p>
      <text:p text:style-name="P7"><text:s text:c="2"/>`tipo` enum('alumno','profesor') DEFAULT NULL,</text:p>
      <text:p text:style-name="P7"><text:s text:c="2"/>PRIMARY KEY (`id`)</text:p>
      <text:p text:style-name="P7">) ENGINE=InnoDB AUTO_INCREMENT=6 DEFAULT CHARSET=utf8mb4 COLLATE=utf8mb4_0900_ai_ci;</text:p>
      <text:p text:style-name="P7"/>
      <text:p text:style-name="P7">--</text:p>
      <text:p text:style-name="P7">-- Table structure for table `pedido`</text:p>
      <text:p text:style-name="P7">--</text:p>
      <text:p text:style-name="P7"/>
      <text:p text:style-name="P7">DROP TABLE IF EXISTS `pedido`;</text:p>
      <text:p text:style-name="P7">CREATE TABLE `pedido` (</text:p>
      <text:p text:style-name="P7"><text:s text:c="2"/>`id` int NOT NULL AUTO_INCREMENT,</text:p>
      <text:p text:style-name="P7"><text:s text:c="2"/>`cliente_id` int DEFAULT NULL,</text:p>
      <text:p text:style-name="P7"><text:s text:c="2"/>`metodo_pago` enum('efectivo','tarjeta','bizum') DEFAULT NULL,</text:p>
      <text:p text:style-name="P7"><text:s text:c="2"/>`precio_total` decimal(10,2) DEFAULT NULL,</text:p>
      <text:p text:style-name="P7"><text:s text:c="2"/>`estado` enum('ABIERTO','CERRADO') NOT NULL DEFAULT 'ABIERTO',</text:p>
      <text:p text:style-name="P7"><text:s text:c="2"/>PRIMARY KEY (`id`),</text:p>
      <text:p text:style-name="P7"><text:s text:c="2"/>KEY `cliente_id` (`cliente_id`),</text:p>
      <text:p text:style-name="P7"><text:s text:c="2"/>CONSTRAINT `pedido_ibfk_1` FOREIGN KEY (`cliente_id`) REFERENCES `cliente` (`id`) ON DELETE CASCADE</text:p>
      <text:p text:style-name="P7">) ENGINE=InnoDB AUTO_INCREMENT=4 DEFAULT CHARSET=utf8mb4 COLLATE=utf8mb4_0900_ai_ci;</text:p>
      <text:p text:style-name="P7"/>
      <text:p text:style-name="P7"><text:soft-page-break/>--</text:p>
      <text:p text:style-name="P7">-- Table structure for table `pedido_producto`</text:p>
      <text:p text:style-name="P7">--</text:p>
      <text:p text:style-name="P7"/>
      <text:p text:style-name="P7">DROP TABLE IF EXISTS `pedido_producto`;</text:p>
      <text:p text:style-name="P7">CREATE TABLE `pedido_producto` (</text:p>
      <text:p text:style-name="P7"><text:s text:c="2"/>`id` int NOT NULL AUTO_INCREMENT,</text:p>
      <text:p text:style-name="P7"><text:s text:c="2"/>`pedido_id` int DEFAULT NULL,</text:p>
      <text:p text:style-name="P7"><text:s text:c="2"/>`producto_id` int DEFAULT NULL,</text:p>
      <text:p text:style-name="P7"><text:s text:c="2"/>`cantidad` int DEFAULT NULL,</text:p>
      <text:p text:style-name="P7"><text:s text:c="2"/>PRIMARY KEY (`id`),</text:p>
      <text:p text:style-name="P7"><text:s text:c="2"/>KEY `pedido_id` (`pedido_id`),</text:p>
      <text:p text:style-name="P7"><text:s text:c="2"/>KEY `producto_id` (`producto_id`),</text:p>
      <text:p text:style-name="P7"><text:s text:c="2"/>CONSTRAINT `pedido_producto_ibfk_1` FOREIGN KEY (`pedido_id`) REFERENCES `pedido` (`id`) ON DELETE CASCADE,</text:p>
      <text:p text:style-name="P7"><text:s text:c="2"/>CONSTRAINT `pedido_producto_ibfk_2` FOREIGN KEY (`producto_id`) REFERENCES `producto` (`id`) ON DELETE CASCADE</text:p>
      <text:p text:style-name="P7">) ENGINE=InnoDB AUTO_INCREMENT=3 DEFAULT CHARSET=utf8mb4 COLLATE=utf8mb4_0900_ai_ci;</text:p>
      <text:p text:style-name="P7"/>
      <text:p text:style-name="P7"/>
      <text:p text:style-name="P7">--</text:p>
      <text:p text:style-name="P7">-- Table structure for table `producto`</text:p>
      <text:p text:style-name="P7">--</text:p>
      <text:p text:style-name="P7"/>
      <text:p text:style-name="P7">DROP TABLE IF EXISTS `producto`;</text:p>
      <text:p text:style-name="P7">CREATE TABLE `producto` (</text:p>
      <text:p text:style-name="P7"><text:s text:c="2"/>`id` int NOT NULL AUTO_INCREMENT,</text:p>
      <text:p text:style-name="P7"><text:s text:c="2"/>`nombre` varchar(100) DEFAULT NULL,</text:p>
      <text:p text:style-name="P7"><text:s text:c="2"/>`precio` decimal(10,2) DEFAULT NULL,</text:p>
      <text:p text:style-name="P7"><text:s text:c="2"/>`cantidad` int DEFAULT NULL,</text:p>
      <text:p text:style-name="P7"><text:s text:c="2"/>`tipo` enum('comida','bebida') DEFAULT NULL,</text:p>
      <text:p text:style-name="P7"><text:s text:c="2"/>PRIMARY KEY (`id`)</text:p>
      <text:p text:style-name="P7">) ENGINE=InnoDB AUTO_INCREMENT=6 DEFAULT CHARSET=utf8mb4 COLLATE=utf8mb4_0900_ai_ci;</text:p>
      <text:p text:style-name="P7"/>
      <text:p text:style-name="P7"><text:line-break/></text:p>
      <text:p text:style-name="P13">Capa de Modelo</text:p>
      <text:p text:style-name="P14"/>
      <text:p text:style-name="P14">Para la parte de modelo hay 8 archivos, 4 de ellos enums que acompañan a los demás.</text:p>
      <text:p text:style-name="P14">En cada uno están declaradas las variables, los constructores y los getters and setters.</text:p>
      <text:p text:style-name="P14"/>
      <text:p text:style-name="P15">¿Por qué hay 3 constructores?</text:p>
      <text:p text:style-name="P16">Se crean 3 constructores porque cada uno permite crear objetos de una forma distinta dependiendo de la necesidad del programa.</text:p>
      <text:p text:style-name="P16">Un constructor permite crear el cliente sin ID, porque la base de datos lo genera automáticamente(incrementando), otro crea el objeto con todos los datos y el vacío permite asignarlos más tarde con setters.</text:p>
      <text:p text:style-name="P14"/>
      <text:p text:style-name="P17">Clases principales:</text:p>
      <text:p text:style-name="P14"><text:s text:c="2"/>- Cliente <text:s text:c="15"/>→ Tiene id, nombre y tipo (ALUMNO / PROFESOR)</text:p>
      <text:p text:style-name="P14"><text:s text:c="2"/>- Producto <text:s text:c="12"/>→ Tiene id, nombre, precio, cantidad y tipo (COMIDA / BEBIDA)</text:p>
      <text:p text:style-name="P14"><text:s text:c="2"/>- Pedido <text:s text:c="16"/>→ Tiene id, precio total, método de pago, estado y cliente asociado <text:tab/><text:tab/><text:tab/> <text:s text:c="3"/><text:span text:style-name="T6">(clienteID)</text:span></text:p>
      <text:p text:style-name="P14"><text:s text:c="2"/>- PedidoProducto <text:s/>→ Relación entre un pedido y sus productos (cantidad incluida)</text:p>
      <text:p text:style-name="P14"><text:s/></text:p>
      <text:p text:style-name="P17">Enumeraciones:</text:p>
      <text:p text:style-name="P14"><text:s text:c="2"/>- TipoCliente <text:s text:c="4"/>→ ALUMNO, PROFESOR</text:p>
      <text:p text:style-name="P14"><text:s text:c="2"/>- TipoProducto <text:s/>→ COMIDA, BEBIDA</text:p>
      <text:p text:style-name="P14"><text:s text:c="2"/>- Estado <text:s text:c="11"/>→ ABIERTO, CERRADO</text:p>
      <text:p text:style-name="P14"><text:s text:c="2"/>- MetodoPago <text:s text:c="2"/>→ EFECTIVO, TARJETA, BIZUM</text:p>
      <text:p text:style-name="P14"><text:s/></text:p>
      <text:p text:style-name="P18">Capa DAO e Implementaciones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0828" officeooo:paragraph-rsid="000e0828"/>
    </style:style>
    <style:style style:name="MT1" style:family="text">
      <style:text-properties fo:color="#000000" loext:opacity="100%" style:font-name="Bahnschrift SemiLight" fo:background-color="transparent" loext:char-shading-value="0"/>
    </style:style>
    <style:style style:name="MT2" style:family="text">
      <style:text-properties fo:color="#000000" loext:opacity="100%" style:font-name="Bahnschrift SemiLight" officeooo:rsid="000e0828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55308d" fo:border-left="none" fo:border-right="none" fo:padding="0.051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ourdes Serrano Gallardo<text:tab/> <text:s text:c="11"/>Proyecto Final Programación<text:tab/>1ºDAW</text:p>
      </style:header>
      <style:footer>
        <text:p text:style-name="Footer"><text:tab/><text:span text:style-name="MT1"><text:page-number text:select-page="current">4</text:page-number></text:span><text:span text:style-name="MT1"> </text:span><text:span text:style-name="MT2">de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4T12:01:55.509624700</meta:creation-date>
    <dc:date>2026-05-14T13:54:59.810604400</dc:date>
    <meta:editing-duration>PT3M38S</meta:editing-duration>
    <meta:editing-cycles>1</meta:editing-cycles>
    <meta:document-statistic meta:table-count="0" meta:image-count="0" meta:object-count="0" meta:page-count="6" meta:paragraph-count="90" meta:word-count="625" meta:character-count="4940" meta:non-whitespace-character-count="4126"/>
    <meta:generator>LibreOffice/25.8.2.2$Windows_X86_64 LibreOffice_project/d401f2107ccab8f924a8e2df40f573aab7605b6f</meta:generator>
  </office:meta>
</office:document-meta>
</file>